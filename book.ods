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9876543210" table:style-name="ce1">
            <text:p>9876543210</text:p>
          </table:table-cell>
          <table:table-cell table:number-columns-repeated="16383"/>
        </table:table-row>
        <table:table-row table:style-name="ro1">
          <table:table-cell office:value-type="float" office:value="9123456780" table:style-name="ce1">
            <text:p>9123456780</text:p>
          </table:table-cell>
          <table:table-cell table:number-columns-repeated="16383"/>
        </table:table-row>
        <table:table-row table:style-name="ro1">
          <table:table-cell office:value-type="float" office:value="9012345678" table:style-name="ce1">
            <text:p>9012345678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14</meta:generator>
    <meta:initial-creator>chaoticcmehhh1930@gmail.com</meta:initial-creator>
    <dc:creator>X</dc:creator>
    <meta:creation-date>2026-04-28T13:26:15Z</meta:creation-date>
    <dc:date>2026-04-28T08:52:15Z</dc:date>
  </office:meta>
</office:document-meta>
</file>